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6pt" officeooo:paragraph-rsid="0010f0ef" style:font-size-asian="14pt" style:font-size-complex="16pt"/>
    </style:style>
    <style:style style:name="P2" style:family="paragraph" style:parent-style-name="Text_20_body">
      <style:text-properties fo:font-size="16pt" officeooo:rsid="0010f0ef" officeooo:paragraph-rsid="0010f0ef" style:font-size-asian="14pt" style:font-size-complex="16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text-properties fo:font-size="16pt" officeooo:rsid="0010f0ef" officeooo:paragraph-rsid="0010f0ef" style:font-size-asian="16pt" style:font-size-complex="16pt"/>
    </style:style>
    <style:style style:name="P5" style:family="paragraph" style:parent-style-name="Text_20_body">
      <style:text-properties fo:font-size="16pt" officeooo:rsid="00122295" officeooo:paragraph-rsid="00122295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0f0ef" officeooo:paragraph-rsid="0010f0ef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6pt" officeooo:rsid="0010f0ef" officeooo:paragraph-rsid="0010f0ef" style:font-size-asian="16pt" style:font-size-complex="16pt"/>
    </style:style>
    <style:style style:name="P8" style:family="paragraph" style:parent-style-name="Heading_20_2">
      <style:text-properties officeooo:rsid="0010f0ef" officeooo:paragraph-rsid="0010f0ef"/>
    </style:style>
    <style:style style:name="P9" style:family="paragraph" style:parent-style-name="Heading_20_2">
      <style:text-properties fo:font-size="18pt" officeooo:rsid="0010f0ef" officeooo:paragraph-rsid="0010f0ef" style:font-size-asian="18pt" style:font-size-complex="18pt"/>
    </style:style>
    <style:style style:name="P10" style:family="paragraph" style:parent-style-name="Heading_20_2">
      <style:text-properties officeooo:rsid="00122295" officeooo:paragraph-rsid="00122295"/>
    </style:style>
    <style:style style:name="P11" style:family="paragraph" style:parent-style-name="Footnote">
      <style:text-properties officeooo:rsid="0016dd70" officeooo:paragraph-rsid="0016dd70"/>
    </style:style>
    <style:style style:name="T1" style:family="text">
      <style:text-properties officeooo:rsid="0010f0ef"/>
    </style:style>
    <style:style style:name="T2" style:family="text">
      <style:text-properties officeooo:rsid="00122295"/>
    </style:style>
    <style:style style:name="T3" style:family="text">
      <style:text-properties officeooo:rsid="00145772"/>
    </style:style>
    <style:style style:name="T4" style:family="text">
      <style:text-properties officeooo:rsid="0016c61f"/>
    </style:style>
    <style:style style:name="T5" style:family="text">
      <style:text-properties officeooo:rsid="0016dd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 pizza aux olives et aux oignons</text:p>
      <text:p text:style-name="P6"/>
      <text:p text:style-name="P6"/>
      <text:p text:style-name="P7">Pour une pizza qui tient dans un grand plat pyrex. Mettons 8 personnes. </text:p>
      <text:h text:style-name="P8" text:outline-level="2"/>
      <text:h text:style-name="P9" text:outline-level="2">La pâte</text:h>
      <text:p text:style-name="P1">- <text:span text:style-name="T1">500 g de farine.</text:span></text:p>
      <text:p text:style-name="P1">- <text:span text:style-name="T1">20 grammes de levure</text:span></text:p>
      <text:p text:style-name="P1">- <text:span text:style-name="T1">250 ml d’eau</text:span></text:p>
      <text:p text:style-name="P1">- <text:span text:style-name="T1">Un peu de sucre</text:span></text:p>
      <text:p text:style-name="P1">- <text:span text:style-name="T1">Un peu de sel. </text:span></text:p>
      <text:p text:style-name="P2">Faire un puits avec la farine et le sel, et y mettre l’eau. Mélanger pour avoir une pâte homogène. </text:p>
      <text:p text:style-name="P2">Faire fondre la le<text:span text:style-name="T2">vu</text:span>re dans un <text:span text:style-name="T3">p</text:span>eu d’<text:span text:style-name="T3">e</text:span>au tiède, et ajouter le sucre. </text:p>
      <text:p text:style-name="P2">Ajouter ce mélange à la pâte, et m<text:span text:style-name="T2">é</text:span>lange<text:span text:style-name="T4">r</text:span> <text:s/>à la main, jusqu’à obtenir une p<text:span text:style-name="T2">â</text:span>te lisse, <text:span text:style-name="T2">é</text:span>lastique, non collante. Si elle colle, ajouter un peu de farine. Laisse<text:span text:style-name="T4">r</text:span> cette pâte reposer une heure, elle devrait doubler de volume. </text:p>
      <text:h text:style-name="Heading_20_2" text:outline-level="2">La garniture</text:h>
      <text:p text:style-name="P3">- 300 g<text:span text:style-name="T1">rammes d’olives noires dénoyautées.</text:span></text:p>
      <text:p text:style-name="P3">- <text:span text:style-name="T1">Deux ou trois oignons.</text:span></text:p>
      <text:p text:style-name="P3">- <text:span text:style-name="T1">Quelques anchois pour saler le mélange. </text:span></text:p>
      <text:p text:style-name="P4">Faire revenir les olives, les oignons et les anchois dans une poêle, jusqu’à ce que <text:s/>les oignons deviennent mous, transparents et sucrés. </text:p>
      <text:h text:style-name="P10" text:outline-level="2">Pour finir</text:h>
      <text:p text:style-name="P5">Partage<text:span text:style-name="T4">r</text:span> le pâton en deux. Tapisse<text:span text:style-name="T4">r</text:span> le plat de la première partie de la pâte, en la faisant remonter le long des bords du plat. </text:p>
      <text:p text:style-name="P5">Verser le mélange olives-oignons. </text:p>
      <text:p text:style-name="P5"><text:soft-page-break/>Couvr<text:span text:style-name="T4">ir</text:span> avec l’autre partie de la pâte. <text:span text:style-name="T3">Pincer les pâtes pour fermer le tout.</text:span></text:p>
      <text:p text:style-name="P5">Décore<text:span text:style-name="T4">r</text:span> avec des tranches de tomates et des anchois. </text:p>
      <text:p text:style-name="P5">Verse<text:span text:style-name="T4">r</text:span> un filet l’huile sur <text:span text:style-name="T3">le </text:span>dessu<text:span text:style-name="T3">s</text:span>, et mett<text:span text:style-name="T4">re</text:span> 30-40 minutes au four <text:span text:style-name="T5">préchauffé à 180 degrés Celsius</text:span><text:span text:style-name="T5"><text:note text:id="ftn0" text:note-class="footnote"><text:note-citation>1</text:note-citation><text:note-body><text:p text:style-name="P11">Sinon y en a qui vont dire « Celsius, Farenheit ou Kelvin ? </text:p></text:note-body></text:note></text:span>. <text:s/><text:span text:style-name="T3">Quand c’est cuit, ça doit faire blong blong blong quand on tape dessus. </text:span>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7-03T17:08:24.039000000</meta:creation-date>
    <dc:date>2026-07-03T20:01:28.190000000</dc:date>
    <meta:editing-duration>PT9M54S</meta:editing-duration>
    <meta:editing-cycles>5</meta:editing-cycles>
    <meta:generator>LibreOffice/5.4.5.1$Windows_X86_64 LibreOffice_project/79c9829dd5d8054ec39a82dc51cd9eff340dbee8</meta:generator>
    <meta:document-statistic meta:table-count="0" meta:image-count="0" meta:object-count="0" meta:page-count="2" meta:paragraph-count="23" meta:word-count="256" meta:character-count="1389" meta:non-whitespace-character-count="1141"/>
  </office:meta>
</office:document-meta>
</file>